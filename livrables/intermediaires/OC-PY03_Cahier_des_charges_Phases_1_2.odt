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78000000438A11F0241DB057D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666666" style:font-name="Libre Franklin" fo:font-style="italic" fo:background-color="#d9d2e9" style:font-name-asian="Libre Franklin1" style:font-style-asian="italic" style:font-name-complex="Libre Franklin1"/>
    </style:style>
    <style:style style:name="P3" style:family="paragraph" style:parent-style-name="Standard">
      <style:paragraph-properties fo:text-align="justify" style:justify-single-word="false"/>
      <style:text-properties fo:color="#666666" style:font-name="Libre Franklin" fo:font-style="italic" style:font-name-asian="Libre Franklin1" style:font-style-asian="italic" style:font-name-complex="Libre Franklin1"/>
    </style:style>
    <style:style style:name="P4" style:family="paragraph" style:parent-style-name="Standard" style:master-page-name="Standard">
      <style:paragraph-properties fo:text-align="start" style:justify-single-word="false" style:page-number="1"/>
    </style:style>
    <style:style style:name="P5" style:family="paragraph" style:parent-style-name="Heading_20_1">
      <style:paragraph-properties fo:text-align="justify" style:justify-single-word="false"/>
    </style:style>
    <style:style style:name="P6" style:family="paragraph" style:parent-style-name="Title">
      <style:paragraph-properties fo:margin-top="0in" fo:margin-bottom="0.139in" loext:contextual-spacing="false" fo:line-height="100%" fo:text-align="center" style:justify-single-word="false"/>
    </style:style>
    <style:style style:name="P7" style:family="paragraph" style:parent-style-name="Subtitle">
      <style:paragraph-properties fo:margin-top="0in" fo:margin-bottom="0.139in" loext:contextual-spacing="false" fo:line-height="100%" fo:text-align="center" style:justify-single-word="false"/>
    </style:style>
    <style:style style:name="T1" style:family="text">
      <style:text-properties style:font-name="Libre Franklin" style:font-name-asian="Libre Franklin1" style:font-name-complex="Libre Franklin1"/>
    </style:style>
    <style:style style:name="T2" style:family="text">
      <style:text-properties fo:color="#c64654" style:font-name="Libre Franklin SemiBold" fo:font-size="18pt" style:font-name-asian="Libre Franklin SemiBold1" style:font-size-asian="18pt" style:font-name-complex="Libre Franklin SemiBold1" style:font-size-complex="18pt"/>
    </style:style>
    <style:style style:name="T3" style:family="text">
      <style:text-properties fo:color="#666666" style:font-name="Libre Franklin" fo:font-style="italic" style:font-name-asian="Libre Franklin1" style:font-style-asian="italic" style:font-name-complex="Libre Frankli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3.6291in, 0in, 3.9835in, 0in)" draw:luminance="0%" draw:contrast="0%" draw:red="0%" draw:green="0%" draw:blue="0%" draw:gamma="100%" draw:color-inversion="false" draw:image-opacity="100%" draw:color-mode="standard"/>
    </style:style>
    <style:style style:name="P8" style:family="paragraph" style:parent-style-name="Standard">
      <style:paragraph-properties fo:margin-top="0.12in" fo:margin-bottom="0.03in"/>
      <style:text-properties fo:font-weight="bold" style:font-weight-asian="bold" style:font-weight-complex="bold" fo:font-size="11pt"/>
    </style:style>
    <style:style style:name="P9" style:family="paragraph" style:parent-style-name="Standard">
      <style:paragraph-properties fo:margin-left="0.24in" fo:text-indent="-0.16in" fo:margin-top="0in" fo:margin-bottom="0.02in" fo:text-align="star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png" text:anchor-type="as-char" svg:width="6.2709in" svg:height="1.7398in" draw:z-index="0"><draw:image xlink:href="Pictures/100000000000078000000438A11F0241DB057D46.png" xlink:type="simple" xlink:show="embed" xlink:actuate="onLoad" loext:mime-type="image/png"/></draw:frame></text:p>
      <text:p text:style-name="P6"><text:bookmark text:name="_7tvnmscj4usj"/><text:span text:style-name="T1">Cahier des charges</text:span></text:p>
      <text:p text:style-name="P7"><text:bookmark text:name="_h6v6gy7r1qzi"/><text:span text:style-name="T2">Application HomeSkolar</text:span></text:p>
      <text:p text:style-name="P5"><text:bookmark text:name="_jfx950gmqnes"/><text:span text:style-name="T1">Spécifications fonctionnelles</text:span></text:p>
      <text:p text:style-name="P1">HomeSkolar met en relation des élèves en difficulté scolaire avec des tuteurs bénévoles à distance. Le site doit faciliter leur accompagnement grâce aux fonctionnalités suivantes.</text:p>
      <text:p text:style-name="P8">1. Gestion du compte utilisateur</text:p>
      <text:p text:style-name="P1">L’élève et le tuteur bénévole pourront :</text:p>
      <text:p text:style-name="P9">• s’inscrire ;</text:p>
      <text:p text:style-name="P9">• se connecter ;</text:p>
      <text:p text:style-name="P9">• gérer leur mot de passe ;</text:p>
      <text:p text:style-name="P9">• gérer leurs données personnelles.</text:p>
      <text:p text:style-name="P8">2. Communication</text:p>
      <text:p text:style-name="P1">Un système de communication simple permettra à l’élève et à son tuteur d’échanger et de consulter des messages.</text:p>
      <text:p text:style-name="P9">• l’élève pourra épingler certains messages afin de les retrouver facilement ;</text:p>
      <text:p text:style-name="P9">• l’utilisateur sera notifié lorsqu’un message n’a pas été lu.</text:p>
      <text:p text:style-name="P8">3. Rencontres et calendrier</text:p>
      <text:p text:style-name="P1">L’élève et le tuteur pourront planifier leurs rencontres et consulter les événements et rendez-vous affichés dans une page de calendrier classique. Les rencontres prendront la forme de courts rendez-vous prévus chaque semaine.</text:p>
      <text:p text:style-name="P8">4. Gestion des tâches</text:p>
      <text:p text:style-name="P1">À la fin de chaque rencontre, l’élève pourra consulter les tâches à réaliser avant la rencontre suivante. Ces tâches seront signalées dans l’application afin de faciliter son suivi.</text:p>
      <text:p text:style-name="P9">• l’élève pourra créer une tâche pour lui-même, comme une note ou un mémo ;</text:p>
      <text:p text:style-name="P9">• le tuteur pourra également créer une tâche personnelle, une note ou un mémo.</text:p>
      <text:p text:style-name="P2"/>
      <text:p text:style-name="P5"><text:span text:style-name="T1">Veille technologique</text:span></text:p>
      <text:p text:style-name="P1">La veille a porté sur les choix structurants nécessaires à HomeSkolar : interface web, back-end Python et stockage des données. Les solutions ont été évaluées selon leur adéquation aux besoins, leur simplicité, leur stabilité, leur documentation, l’activité de leur communauté, leur maintenabilité, leur évolutivité et leur coût. Le principe retenu est de préférer une solution intégrée et éprouvée à une architecture inutilement complexe.</text:p>
      <text:p text:style-name="P8">1. Solutions front-end étudiées</text:p>
      <text:p text:style-name="P1">Les gabarits Django associés à Bootstrap 5.3 permettent de produire une interface responsive dans la même application que le back-end. Cette solution limite l’outillage et facilite la maintenance. React offre une interface par composants et un vaste écosystème, mais impose une application front-end et des échanges API distincts. Vue est progressif et accessible, mais ajoute également un framework JavaScript qui n’est pas indispensable aux interactions actuellement demandées.</text:p>
      <text:p text:style-name="P8">2. Solutions back-end Python étudiées</text:p>
      <text:p text:style-name="P1">Django 5.2 LTS intègre l’authentification, les autorisations, les formulaires, l’ORM, les vues et les gabarits nécessaires aux comptes, messages, rendez-vous et tâches. Flask 3.1 est plus minimal, mais demande d’assembler plusieurs extensions pour obtenir le même socle. FastAPI apporte le typage, la validation et une documentation OpenAPI automatique ; il convient particulièrement à une architecture centrée sur une API, mais nécessite ici davantage de composants complémentaires.</text:p>
      <text:p text:style-name="P8">3. Solutions de stockage étudiées</text:p>
      <text:p text:style-name="P1">PostgreSQL est une base relationnelle open source, mature et transactionnelle, bien intégrée à Django. Elle convient aux relations entre utilisateurs, messages, rendez-vous, événements et tâches. SQLite ne nécessite aucune administration et reste adapté au développement local, mais ses limites en écriture concurrente le rendent moins approprié à la production multi-utilisateur. MySQL est également mature et supporté, sans présenter d’avantage décisif pour ce projet face à PostgreSQL.</text:p>
      <text:p text:style-name="P8">4. Orientation technique retenue</text:p>
      <text:p text:style-name="P1">HomeSkolar sera orienté vers une application web monolithique modulaire utilisant Django 5.2 LTS, les gabarits Django avec Bootstrap 5.3 et PostgreSQL. Cette combinaison couvre les besoins dans une seule application, réduit le nombre de dépendances et facilite les tests et la maintenance. React, Vue, Flask, FastAPI et MySQL restent des solutions valables, mais leur adoption n’est pas justifiée par le périmètre actuel. Cette orientation sera détaillée dans les spécifications techniques.</text:p>
      <text:p text:style-name="P8">5. Sources consultées le 12 juillet 2026</text:p>
      <text:p text:style-name="P9">• Django Software Foundation, documentation et notes de version Django 5.2 LTS : https://docs.djangoproject.com/en/5.2/</text:p>
      <text:p text:style-name="P9">• Bootstrap, documentation officielle 5.3 : https://getbootstrap.com/docs/5.3/</text:p>
      <text:p text:style-name="P9">• Pallets et FastAPI, documentations officielles : https://flask.palletsprojects.com/ et https://fastapi.tiangolo.com/</text:p>
      <text:p text:style-name="P9">• PostgreSQL Global Development Group, documentation officielle : https://www.postgresql.org/docs/</text:p>
      <text:p text:style-name="P2"/>
      <text:p text:style-name="P5"><text:bookmark text:name="_ayr9ylen765u"/><text:span text:style-name="T1">Spécifications techniques</text:span></text:p>
      <text:p text:style-name="P8">1. Architecture générale</text:p>
      <text:p text:style-name="P1">HomeSkolar repose sur une application web monolithique modulaire. Un projet Django unique assure le rendu des pages, les règles métier, l’authentification et la persistance. Les domaines accounts, relationships, messaging, calendar, tasks et notifications restent séparés afin de faciliter les tests et la maintenance.</text:p>
      <text:p text:style-name="P8">2. Technologies retenues</text:p>
      <text:p text:style-name="P1">Python 3.13 exécute la logique applicative. Django 5.2 LTS fournit l’authentification, les sessions, les formulaires, l’ORM, les vues et les gabarits. Bootstrap 5.3 assure une interface responsive sans application front-end séparée. PostgreSQL 17 garantit une persistance relationnelle transactionnelle. Les versions correctives seront verrouillées au démarrage du développement.</text:p>
      <text:p text:style-name="P8">3. Interface web</text:p>
      <text:p text:style-name="P1">Les pages sont rendues côté serveur avec les gabarits Django. L’interface doit fonctionner sur mobile, tablette et ordinateur, rester navigable au clavier, associer les erreurs aux champs concernés et ne pas dépendre uniquement de la couleur. JavaScript est limité aux interactions utiles, notamment le calendrier.</text:p>
      <text:p text:style-name="P8">4. Comptes et relation élève-tuteur</text:p>
      <text:p text:style-name="P1">Un modèle utilisateur personnalisé distingue les rôles élève et tuteur. Django Auth gère les mots de passe et les sessions. Une relation explicite associe l’élève à son tuteur et conditionne l’accès aux messages, rencontres et tâches de suivi. Le processus d’affectation reste à confirmer avec le client.</text:p>
      <text:p text:style-name="P8">5. Communication</text:p>
      <text:p text:style-name="P1">Une conversation relie les deux membres d’une relation. Chaque message conserve son auteur, son contenu, sa date et son état de lecture. L’élève peut épingler un message pour son propre usage. Un message reçu non lu produit une notification interne.</text:p>
      <text:p text:style-name="P8">6. Rencontres et calendrier</text:p>
      <text:p text:style-name="P1">Une rencontre comporte une date de début et de fin et relie l’élève à son tuteur. Les horaires incohérents sont refusés. Les rendez-vous et événements autorisés sont affichés dans une vue calendrier. La récurrence, la modification, l’annulation et les rappels doivent encore être précisés.</text:p>
      <text:p text:style-name="P8">7. Tâches et notifications</text:p>
      <text:p text:style-name="P1">La solution distingue les tâches de suivi visibles dans la relation élève-tuteur et les tâches, notes ou mémos personnels visibles uniquement par leur propriétaire. Les notifications internes signalent les messages non lus et les tâches portées à l’attention de l’élève. Aucun courriel, SMS ou push n’est prévu.</text:p>
      <text:p text:style-name="P8">8. Sécurité et données</text:p>
      <text:p text:style-name="P1">Les contrôles d’autorisation sont appliqués côté serveur à chaque objet. Les formulaires utilisent la protection CSRF. Les cookies de session sont sécurisés en HTTPS. Les données sont validées et échappées. Les secrets ne sont jamais versionnés. Les journaux excluent mots de passe, sessions, contenus privés et données personnelles inutiles.</text:p>
      <text:p text:style-name="P8">9. Erreurs, qualité et tests</text:p>
      <text:p text:style-name="P1">Les erreurs de validation sont expliquées dans le formulaire ; les accès interdits et objets absents ne révèlent aucune donnée. Les tests couvrent les règles métier, les autorisations, PostgreSQL et les parcours critiques des comptes, messages, rencontres, tâches et notifications. Les contrôles responsive, clavier et dépendances complètent la validation.</text:p>
      <text:p text:style-name="P8">10. Traçabilité et limites</text:p>
      <text:p text:style-name="P1">Les User Stories de compte sont couvertes par accounts ; celles de communication par messaging, notifications et relationships ; celles de calendrier par calendar et relationships ; celles de tâches par tasks, notifications et relationships. L’hébergeur, l’outil de déploiement et toute fonctionnalité non demandée restent hors périmètre.</text:p>
      <text:p text:style-name="P5"><text:bookmark text:name="_maj8pddwdp8p"/><text:span text:style-name="T1">Diagramme de classes</text:span></text:p>
      <text:p text:style-name="P1"><text:span text:style-name="T3">Le diagramme doit utiliser la nomenclature UML. Inclure chaque classe obligatoire pour l’application. Assurez-vous qu’il est extensible pour favoriser l’évolutiv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0" meta:word-count="107" meta:character-count="790" meta:non-whitespace-character-count="691"/>
    <meta:generator>LibreOfficeDev/6.0.5.2$Linux_X86_64 LibreOffice_project/</meta:generator>
  </office:meta>
</office:document-meta>
</file>